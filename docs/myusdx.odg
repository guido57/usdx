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A00000041FE6010DEBA991EE8.png" manifest:media-type="image/png"/>
  <manifest:file-entry manifest:full-path="Pictures/100000010000007300000089F8F853D3DB9CBEAE.png" manifest:media-type="image/png"/>
  <manifest:file-entry manifest:full-path="Pictures/1000000100000380000002913ADDF99E171E1309.png" manifest:media-type="image/png"/>
  <manifest:file-entry manifest:full-path="Pictures/10000001000002950000015533E9416BA0EE38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94cm" fo:min-width="2.276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094cm" fo:min-width="2.675cm"/>
      <style:paragraph-properties style:writing-mode="lr-tb"/>
    </style:style>
    <style:style style:name="gr4" style:family="graphic" style:parent-style-name="standard">
      <style:graphic-properties svg:stroke-color="#ff4000" draw:marker-start="Arrowheads_20_2" draw:marker-end="Arrowheads_20_2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53cm" fo:min-width="2.023cm"/>
      <style:paragraph-properties style:writing-mode="lr-tb"/>
    </style:style>
    <style:style style:name="gr6" style:family="graphic" style:parent-style-name="standard">
      <style:graphic-properties draw:marker-end="Arrowheads_20_2" draw:textarea-vertical-align="middle"/>
    </style:style>
    <style:style style:name="gr7" style:family="graphic" style:parent-style-name="standard">
      <style:graphic-properties svg:stroke-color="#ff0000" draw:marker-start="Arrowheads_20_2" draw:marker-end="Arrowheads_20_2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052cm" fo:min-width="2.024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094cm" fo:min-width="2.358cm"/>
      <style:paragraph-properties style:writing-mode="lr-tb"/>
    </style:style>
    <style:style style:name="gr10" style:family="graphic" style:parent-style-name="standard">
      <style:graphic-properties svg:stroke-color="#158466" draw:marker-end="Arrowheads_20_2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322cm" fo:min-width="2.276cm"/>
      <style:paragraph-properties style:writing-mode="lr-tb"/>
    </style:style>
    <style:style style:name="gr12" style:family="graphic" style:parent-style-name="standard">
      <style:graphic-properties svg:stroke-width="0.035cm" svg:stroke-color="#ffbf00" draw:marker-start-width="0.252cm" draw:marker-end="Arrowheads_20_2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094cm" fo:min-width="3.627cm"/>
      <style:paragraph-properties style:writing-mode="lr-tb"/>
    </style:style>
    <style:style style:name="gr14" style:family="graphic" style:parent-style-name="standard">
      <style:graphic-properties svg:stroke-color="#ffbf00" draw:marker-end="Arrowheads_20_2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35cm" fo:min-width="2.992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5.465cm" fo:min-width="19.503cm"/>
      <style:paragraph-properties style:writing-mode="lr-tb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 fo:min-height="1.687cm" fo:min-width="3.627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17cm" fo:min-width="1.088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687cm" fo:min-width="1.40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734cm" fo:min-width="1.40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52cm" fo:min-width="2.675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734cm" fo:min-width="3.627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734cm" fo:min-width="2.357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687cm" fo:min-width="1.7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center" style:writing-mode="lr-tb"/>
      <style:text-properties fo:font-size="12pt" style:font-size-asian="14pt" style:font-size-complex="14pt"/>
    </style:style>
    <style:style style:name="P9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77cm" svg:height="5.404cm" svg:x="3.54cm" svg:y="6.391cm">
          <draw:image xlink:href="Pictures/10000001000002950000015533E9416BA0EE3886.png" xlink:type="simple" xlink:show="embed" xlink:actuate="onLoad" draw:mime-type="image/png">
            <text:p/>
          </draw:image>
        </draw:frame>
        <draw:frame draw:style-name="gr1" draw:text-style-name="P1" draw:layer="layout" svg:width="10.49cm" svg:height="7.691cm" svg:x="3.54cm" svg:y="10.842cm">
          <draw:image xlink:href="Pictures/1000000100000380000002913ADDF99E171E130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2" draw:text-style-name="P3" xml:id="id2" draw:id="id2" draw:layer="layout" svg:width="2.776cm" svg:height="2.344cm" svg:x="3.084cm" svg:y="5.713cm">
          <text:p text:style-name="P2"><text:span text:style-name="T1">PWR and SWR me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175cm" svg:height="2.344cm" svg:x="6.715cm" svg:y="5.762cm">
          <text:p text:style-name="P2"><text:span text:style-name="T1">Low pass filter banks</text:span><text:span text:style-name="T1"><text:line-break/></text:span><text:span text:style-name="T1">MCP23017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2.418cm" svg:height="2.973cm" svg:x="1.317cm" svg:y="2.587cm">
          <draw:image xlink:href="Pictures/100000010000007300000089F8F853D3DB9CBEAE.png" xlink:type="simple" xlink:show="embed" xlink:actuate="onLoad" draw:mime-type="image/png">
            <text:p/>
          </draw:image>
        </draw:frame>
        <draw:connector draw:style-name="gr4" draw:text-style-name="P4" draw:layer="layout" svg:x1="2.526cm" svg:y1="5.56cm" svg:x2="3.084cm" svg:y2="6.885cm" draw:start-shape="id1" draw:start-glue-point="2" draw:end-shape="id2" draw:end-glue-point="3" svg:d="M2526 5560v1325h558" svg:viewBox="0 0 559 1326">
          <text:p/>
        </draw:connector>
        <draw:custom-shape draw:style-name="gr2" draw:text-style-name="P6" xml:id="id4" draw:id="id4" draw:layer="layout" svg:width="2.776cm" svg:height="2.344cm" svg:x="10.606cm" svg:y="5.762cm">
          <text:p text:style-name="P5"><text:span text:style-name="T2">RX / TX switch</text:span><text:span text:style-name="T2"><text:line-break/></text:span><text:span text:style-name="T2">MCP23017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89cm" svg:y1="6.934cm" svg:x2="10.606cm" svg:y2="6.934cm" draw:start-shape="id3" draw:start-glue-point="1" draw:end-shape="id4" draw:end-glue-point="3" svg:d="M9890 6934h716" svg:viewBox="0 0 717 1">
          <text:p/>
        </draw:connector>
        <draw:custom-shape draw:style-name="gr5" draw:text-style-name="P6" xml:id="id5" draw:id="id5" draw:layer="layout" svg:width="2.523cm" svg:height="1.303cm" svg:x="3.248cm" svg:y="11.396cm">
          <text:p text:style-name="P5"><text:span text:style-name="T2">Show PWR and SWR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472cm" svg:y1="8.057cm" svg:x2="4.509cm" svg:y2="11.396cm" draw:start-shape="id2" draw:start-glue-point="2" draw:end-shape="id5" draw:end-glue-point="0" svg:d="M4472 8057v1669h37v1670" svg:viewBox="0 0 38 3340">
          <text:p/>
        </draw:connector>
        <draw:connector draw:style-name="gr7" draw:text-style-name="P4" draw:layer="layout" svg:x1="5.86cm" svg:y1="6.885cm" svg:x2="6.715cm" svg:y2="6.934cm" draw:start-shape="id2" draw:start-glue-point="1" draw:end-shape="id3" draw:end-glue-point="3" svg:d="M5860 6885h427v49h428" svg:viewBox="0 0 856 50">
          <text:p/>
        </draw:connector>
        <draw:connector draw:style-name="gr6" draw:text-style-name="P4" draw:layer="layout" svg:x1="8.131cm" svg:y1="11.444cm" svg:x2="8.302cm" svg:y2="8.106cm" draw:start-shape="id6" draw:start-glue-point="0" draw:end-shape="id3" draw:end-glue-point="2" svg:d="M8131 11444v-1669h171v-1669" svg:viewBox="0 0 172 3339">
          <text:p/>
        </draw:connector>
        <draw:custom-shape draw:style-name="gr8" draw:text-style-name="P6" xml:id="id6" draw:id="id6" draw:layer="layout" svg:width="2.524cm" svg:height="1.302cm" svg:x="6.869cm" svg:y="11.444cm">
          <text:p text:style-name="P5"><text:span text:style-name="T2">Set low pass filt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2.524cm" svg:height="1.302cm" svg:x="10.907cm" svg:y="11.445cm">
          <text:p text:style-name="P5"><text:span text:style-name="T2">Switch RX/TX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2.169cm" svg:y1="11.445cm" svg:x2="11.994cm" svg:y2="8.106cm" draw:start-shape="id7" draw:start-glue-point="0" draw:end-shape="id4" draw:end-glue-point="2" svg:d="M12169 11445v-1669h-175v-1670" svg:viewBox="0 0 176 3340">
          <text:p/>
        </draw:connector>
        <draw:custom-shape draw:style-name="gr9" draw:text-style-name="P8" xml:id="id8" draw:id="id8" draw:layer="layout" svg:width="2.858cm" svg:height="2.344cm" svg:x="14.017cm" svg:y="5.762cm">
          <text:p text:style-name="P7"><text:span text:style-name="T3">Quadrature Sampling Detector</text:span><text:span text:style-name="T3"><text:line-break/></text:span><text:span text:style-name="T3">FST3253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3.382cm" svg:y1="6.934cm" svg:x2="14.017cm" svg:y2="6.934cm" draw:start-shape="id4" draw:start-glue-point="1" draw:end-shape="id8" draw:end-glue-point="3" svg:d="M13382 6934h635" svg:viewBox="0 0 636 1">
          <text:p/>
        </draw:connector>
        <draw:custom-shape draw:style-name="gr2" draw:text-style-name="P3" xml:id="id9" draw:id="id9" draw:layer="layout" svg:width="2.776cm" svg:height="2.344cm" svg:x="14.188cm" svg:y="8.579cm">
          <text:p text:style-name="P2"><text:span text:style-name="T1">Local Oscillator</text:span><text:span text:style-name="T1"><text:line-break/></text:span><text:span text:style-name="T1">SI5351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5.576cm" svg:y1="8.579cm" svg:x2="15.446cm" svg:y2="8.106cm" draw:start-shape="id9" draw:start-glue-point="0" draw:end-shape="id8" draw:end-glue-point="2" svg:d="M15576 8579v-236h-130v-237" svg:viewBox="0 0 131 474">
          <text:p/>
        </draw:connector>
        <draw:custom-shape draw:style-name="gr11" draw:text-style-name="P6" xml:id="id10" draw:id="id10" draw:layer="layout" svg:width="2.776cm" svg:height="2.572cm" svg:x="14.188cm" svg:y="11.445cm">
          <text:p text:style-name="P5"><text:span text:style-name="T2">Set tuned freq, TX freq and FT8 modul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576cm" svg:y1="11.445cm" svg:x2="15.576cm" svg:y2="10.923cm" draw:start-shape="id10" draw:start-glue-point="0" draw:end-shape="id9" draw:end-glue-point="2" svg:d="M15576 11445v-522" svg:viewBox="0 0 1 523">
          <text:p/>
        </draw:connector>
        <draw:custom-shape draw:style-name="gr2" draw:text-style-name="P8" xml:id="id11" draw:id="id11" draw:layer="layout" svg:width="2.776cm" svg:height="2.344cm" svg:x="18.145cm" svg:y="2.148cm">
          <text:p text:style-name="P7"><text:span text:style-name="T3">0.5W preampl</text:span><text:span text:style-name="T3"><text:line-break/></text:span><text:span text:style-name="T3">5xBC547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6.964cm" svg:y1="9.751cm" svg:x2="20.921cm" svg:y2="3.32cm" draw:start-shape="id9" draw:start-glue-point="1" draw:end-shape="id11" draw:end-glue-point="1" svg:d="M16964 9751h4458v-6431h-501" svg:viewBox="0 0 4459 6432">
          <text:p/>
        </draw:connector>
        <draw:custom-shape draw:style-name="gr13" draw:text-style-name="P8" xml:id="id12" draw:id="id12" draw:layer="layout" svg:width="4.127cm" svg:height="2.344cm" svg:x="13.065cm" svg:y="2.148cm">
          <text:p text:style-name="P7"><text:span text:style-name="T3">10W ampl</text:span><text:span text:style-name="T3"><text:line-break/></text:span><text:span text:style-name="T3"><text:line-break/></text:span><text:span text:style-name="T3">2xRD16HHF1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8.145cm" svg:y1="3.32cm" svg:x2="17.192cm" svg:y2="3.32cm" draw:start-shape="id11" draw:start-glue-point="3" draw:end-shape="id12" draw:end-glue-point="1" svg:d="M18145 3320h-953" svg:viewBox="0 0 954 1">
          <text:p/>
        </draw:connector>
        <draw:connector draw:style-name="gr14" draw:text-style-name="P4" draw:layer="layout" svg:x1="13.065cm" svg:y1="3.32cm" svg:x2="11.994cm" svg:y2="5.762cm" draw:start-shape="id12" draw:start-glue-point="3" draw:end-shape="id4" draw:end-glue-point="0" svg:d="M13065 3320h-1071v2442" svg:viewBox="0 0 1072 2443">
          <text:p/>
        </draw:connector>
        <draw:custom-shape draw:style-name="gr2" draw:text-style-name="P8" xml:id="id13" draw:id="id13" draw:layer="layout" svg:width="2.776cm" svg:height="2.344cm" svg:x="18.145cm" svg:y="5.762cm">
          <text:p text:style-name="P7"><text:span text:style-name="T3">ADC PCM1808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14" draw:id="id14" draw:layer="layout" svg:width="3.492cm" svg:height="0.985cm" svg:x="18.145cm" svg:y="11.445cm">
          <text:p text:style-name="P5"><text:span text:style-name="T2">CIC Decimator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.533cm" svg:y1="8.106cm" svg:x2="19.891cm" svg:y2="11.445cm" draw:start-shape="id13" draw:start-glue-point="2" draw:end-shape="id14" draw:end-glue-point="0" svg:d="M19533 8106v1669h358v1670" svg:viewBox="0 0 359 3340">
          <text:p/>
        </draw:connector>
        <draw:custom-shape draw:style-name="gr16" draw:text-style-name="P10" draw:layer="layout" svg:width="20.003cm" svg:height="5.715cm" svg:x="2.587cm" svg:y="11.16cm">
          <text:p text:style-name="P9"><text:span text:style-name="T4">ESP32-S3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5" draw:id="id15" draw:layer="layout" svg:width="4.127cm" svg:height="1.937cm" svg:x="17.827cm" svg:y="13.065cm">
          <text:p text:style-name="P11"><text:span text:style-name="T2">AM/CW/LSB/USB</text:span></text:p>
          <text:p text:style-name="P11"><text:span text:style-name="T2">Demodulator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.891cm" svg:y1="12.43cm" svg:x2="19.89cm" svg:y2="13.065cm" draw:start-shape="id14" draw:start-glue-point="2" draw:end-shape="id15" draw:end-glue-point="0" svg:d="M19891 12430v317h-1v318" svg:viewBox="0 0 2 636">
          <text:p/>
        </draw:connector>
        <draw:custom-shape draw:style-name="gr18" draw:text-style-name="P6" xml:id="id16" draw:id="id16" draw:layer="layout" svg:width="1.588cm" svg:height="0.667cm" svg:x="19.097cm" svg:y="15.573cm">
          <text:p text:style-name="P5"><text:span text:style-name="T2">AGC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.89cm" svg:y1="15.002cm" svg:x2="19.891cm" svg:y2="15.573cm" draw:start-shape="id15" draw:start-glue-point="2" draw:end-shape="id16" draw:end-glue-point="0" svg:d="M19890 15002v285h1v286" svg:viewBox="0 0 2 572">
          <text:p/>
        </draw:connector>
        <draw:custom-shape draw:style-name="gr19" draw:text-style-name="P6" xml:id="id18" draw:id="id18" draw:layer="layout" svg:width="1.905cm" svg:height="1.937cm" svg:x="14.97cm" svg:y="17.51cm">
          <text:p text:style-name="P5"><text:span text:style-name="T2">MAX</text:span></text:p>
          <text:p text:style-name="P5"><text:span text:style-name="T2">98357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9" draw:id="id19" draw:layer="layout" svg:width="1.957cm" svg:height="1.719cm" svg:x="20.633cm" svg:y="17.696cm">
          <draw:image xlink:href="Pictures/100000010000004A00000041FE6010DEBA991EE8.png" xlink:type="simple" xlink:show="embed" xlink:actuate="onLoad" draw:mime-type="image/png">
            <text:p/>
          </draw:image>
        </draw:frame>
        <draw:custom-shape draw:style-name="gr20" draw:text-style-name="P6" xml:id="id17" draw:id="id17" draw:layer="layout" svg:width="1.905cm" svg:height="0.984cm" svg:x="14.97cm" svg:y="15.605cm">
          <text:p text:style-name="P5"><text:span text:style-name="T2">I2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.097cm" svg:y1="15.906cm" svg:x2="16.875cm" svg:y2="16.097cm" draw:start-shape="id16" draw:start-glue-point="3" draw:end-shape="id17" draw:end-glue-point="1" svg:d="M19097 15906h-1111v191h-1111" svg:viewBox="0 0 2223 192">
          <text:p/>
        </draw:connector>
        <draw:connector draw:style-name="gr10" draw:text-style-name="P4" draw:layer="layout" svg:x1="15.922cm" svg:y1="16.589cm" svg:x2="15.922cm" svg:y2="17.51cm" draw:start-shape="id17" draw:start-glue-point="2" draw:end-shape="id18" draw:end-glue-point="0" svg:d="M15922 16589v921" svg:viewBox="0 0 1 922">
          <text:p/>
        </draw:connector>
        <draw:connector draw:style-name="gr10" draw:text-style-name="P4" draw:layer="layout" svg:x1="16.875cm" svg:y1="18.478cm" svg:x2="20.633cm" svg:y2="18.555cm" draw:start-shape="id18" draw:start-glue-point="1" draw:end-shape="id19" draw:end-glue-point="3" svg:d="M16875 18478h1879v77h1879" svg:viewBox="0 0 3759 78">
          <text:p/>
        </draw:connector>
        <draw:custom-shape draw:style-name="gr21" draw:text-style-name="P6" xml:id="id20" draw:id="id20" draw:layer="layout" svg:width="3.175cm" svg:height="1.302cm" svg:x="14.017cm" svg:y="14.303cm">
          <text:p text:style-name="P5"><text:span text:style-name="T2">WebServer &amp; <text:s/>WebSocke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line-skew="-0.634cm" svg:x1="19.097cm" svg:y1="15.906cm" svg:x2="17.192cm" svg:y2="14.954cm" draw:start-shape="id16" draw:start-glue-point="3" draw:end-shape="id20" draw:end-glue-point="1" svg:d="M19097 15906h-1587v-952h-318" svg:viewBox="0 0 1906 953">
          <text:p/>
        </draw:connector>
        <draw:custom-shape draw:style-name="gr22" draw:text-style-name="P6" xml:id="id22" draw:id="id22" draw:layer="layout" svg:width="4.127cm" svg:height="0.984cm" svg:x="3.54cm" svg:y="14.335cm">
          <text:p text:style-name="P5"><text:span text:style-name="T2">User Interface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24" draw:id="id24" draw:layer="layout" svg:width="4.127cm" svg:height="0.984cm" svg:x="3.54cm" svg:y="17.478cm">
          <text:p text:style-name="P5"><text:span text:style-name="T2">SSD 1306 </text:span></text:p>
          <text:p text:style-name="P5"><text:span text:style-name="T2">LCD Display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21" draw:id="id21" draw:layer="layout" svg:width="4.127cm" svg:height="0.984cm" svg:x="1.317cm" svg:y="18.78cm">
          <text:p text:style-name="P5"><text:span text:style-name="T2">Volume and Menu Rotary Encoder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23" draw:id="id23" draw:layer="layout" svg:width="4.127cm" svg:height="0.984cm" svg:x="6.398cm" svg:y="18.78cm">
          <text:p text:style-name="P5"><text:span text:style-name="T2">Frequency </text:span></text:p>
          <text:p text:style-name="P5"><text:span text:style-name="T2">Rotary Encoder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3.38cm" svg:y1="18.78cm" svg:x2="3.54cm" svg:y2="14.827cm" draw:start-shape="id21" draw:start-glue-point="0" draw:end-shape="id22" draw:end-glue-point="3" svg:d="M3380 18780v-1730h-342v-2223h502" svg:viewBox="0 0 503 3954">
          <text:p/>
        </draw:connector>
        <draw:connector draw:style-name="gr6" draw:text-style-name="P4" draw:layer="layout" svg:x1="8.461cm" svg:y1="18.78cm" svg:x2="7.667cm" svg:y2="14.827cm" draw:start-shape="id23" draw:start-glue-point="0" draw:end-shape="id22" draw:end-glue-point="1" svg:d="M8461 18780v-3953h-794" svg:viewBox="0 0 795 3954">
          <text:p/>
        </draw:connector>
        <draw:connector draw:style-name="gr6" draw:text-style-name="P4" draw:layer="layout" svg:x1="5.603cm" svg:y1="15.319cm" svg:x2="5.603cm" svg:y2="17.478cm" draw:start-shape="id22" draw:start-glue-point="2" draw:end-shape="id24" draw:end-glue-point="0" svg:d="M5603 15319v2159" svg:viewBox="0 0 1 2160">
          <text:p/>
        </draw:connector>
        <draw:connector draw:style-name="gr10" draw:text-style-name="P4" draw:layer="layout" svg:x1="16.875cm" svg:y1="6.934cm" svg:x2="18.145cm" svg:y2="6.934cm" draw:start-shape="id8" draw:start-glue-point="1" draw:end-shape="id13" draw:end-glue-point="3" svg:d="M16875 6934h1270" svg:viewBox="0 0 1271 1">
          <text:p/>
        </draw:connector>
        <draw:custom-shape draw:style-name="gr23" draw:text-style-name="P6" xml:id="id25" draw:id="id25" draw:layer="layout" svg:width="2.857cm" svg:height="0.984cm" svg:x="10.843cm" svg:y="15.573cm">
          <text:p text:style-name="P5"><text:span text:style-name="T2">Ethernet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2.857cm" svg:height="0.984cm" svg:x="10.843cm" svg:y="14.303cm">
          <text:p text:style-name="P5"><text:span text:style-name="T2">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26" draw:id="id26" draw:layer="layout" svg:width="2.223cm" svg:height="1.937cm" svg:x="11.159cm" svg:y="17.51cm">
          <text:p text:style-name="P5"><text:span text:style-name="T2">W5500</text:span></text:p>
          <text:p text:style-name="P5"><text:span text:style-name="T2">Eth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12.271cm" svg:y1="16.557cm" svg:x2="12.27cm" svg:y2="17.51cm" draw:start-shape="id25" draw:start-glue-point="2" draw:end-shape="id26" draw:end-glue-point="0" svg:d="M12271 16557v476h-1v477" svg:viewBox="0 0 2 9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27T19:18:06.932100125</meta:creation-date>
    <dc:date>2026-05-15T10:20:54.444735461</dc:date>
    <meta:editing-duration>PT35M1S</meta:editing-duration>
    <meta:editing-cycles>6</meta:editing-cycles>
    <meta:generator>LibreOffice/7.3.7.2$Linux_X86_64 LibreOffice_project/30$Build-2</meta:generator>
    <meta:document-statistic meta:object-count="54"/>
  </office:meta>
</office:document-meta>
</file>